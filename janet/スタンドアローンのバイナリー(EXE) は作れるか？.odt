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1f1f1f" loext:opacity="100%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5" style:family="paragraph" style:parent-style-name="Heading_20_2">
      <style:paragraph-properties fo:margin-left="0cm" fo:margin-right="0cm" fo:margin-top="0.635cm" fo:margin-bottom="0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635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  <style:text-properties fo:background-color="#141414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/>
    </style:style>
    <style:style style:name="P11" style:family="paragraph" style:parent-style-name="Quotations">
      <style:paragraph-properties fo:margin-left="1cm" fo:margin-right="1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.423cm" fo:margin-bottom="0cm" style:contextual-spacing="false" fo:text-indent="0cm" style:auto-text-indent="false"/>
      <style:text-properties fo:background-color="#141414" loext:padding="0cm" loext:border="none"/>
    </style:style>
    <style:style style:name="P14" style:family="paragraph" style:parent-style-name="Preformatted_20_Text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635cm" fo:orphans="1" fo:text-indent="0cm" style:auto-text-indent="false" fo:padding="0cm" fo:border="none"/>
    </style:style>
    <style:style style:name="P16" style:family="paragraph" style:parent-style-name="Text_20_body">
      <style:paragraph-properties fo:margin-left="0.212cm" fo:margin-right="0.132cm" fo:margin-top="0cm" fo:margin-bottom="0cm" style:contextual-spacing="false" fo:text-align="center" style:justify-single-word="false" fo:text-indent="0cm" style:auto-text-indent="false"/>
      <style:text-properties fo:color="#444746" loext:opacity="100%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T3" style:family="text">
      <style:text-properties loext:padding="0cm" loext:border="none"/>
    </style:style>
    <style:style style:name="T4" style:family="text">
      <style:text-properties fo:font-weight="bold" loext:padding="0cm" loext:border="none"/>
    </style:style>
    <style:style style:name="T5" style:family="text">
      <style:text-properties style:font-weight-asian="bold" loext:padding="0cm" loext:border="none"/>
    </style:style>
    <style:style style:name="T6" style:family="text">
      <style:text-properties fo:background-color="#141414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hat-history">
        <text:section text:style-name="Sect1" text:name="4442c8b8eb1d96f5">
          <text:p text:style-name="P1"/>
          <text:section text:style-name="Sect1" text:name="user-query-content-0">
            <text:p text:style-name="P2">Windows 上の janet lang でスクリプトから、スタンドアローンのバイナリー(EXE) は作れるか？</text:p>
          </text:section>
          <text:section text:style-name="Sect2" text:name="model-response-message-contentr_4442c8b8eb1d96f5">
            <text:p text:style-name="P3">はい、Windows 上の Janet でスクリプトから<text:span text:style-name="T1">スタンドアロンのバイナリ（</text:span><text:span text:style-name="T2">EXE</text:span><text:span text:style-name="T1">ファイル）を作ることは可能</text:span>です。</text:p>
            <text:p text:style-name="P3"><text:span text:style-name="T3">Janet には標準でコンパイル機能が備わっており、C言語のコンパイラ（MSVC や MinGW など）が環境にあれば、外部ライブラリに依存しない1つの </text:span><text:span text:style-name="Source_20_Text"><text:span text:style-name="T3">.exe</text:span></text:span><text:span text:style-name="T3"> ファイルを出力できます。</text:span></text:p>
            <text:p text:style-name="P4">具体的な手順と注意点をまとめました。</text:p>
            <text:h text:style-name="P5" text:outline-level="2">🛠️ EXEファイルを作成する手順</text:h>
            <text:p text:style-name="P3"><text:span text:style-name="T3">最も簡単で推奨される方法は、Janet のビルドツールである </text:span><text:span text:style-name="Source_20_Text"><text:span text:style-name="T4">jpm</text:span></text:span><text:span text:style-name="T4"> (Janet Project Manager)</text:span><text:span text:style-name="T3"> を使用する方法です。</text:span></text:p>
            <text:h text:style-name="P6" text:outline-level="3">1. 準備：Cコンパイラのインストール</text:h>
            <text:p text:style-name="P4">Janet がスクリプトをCコードに変換し、それをネイティブバイナリにコンパイルするため、Windows 上にCコンパイラが必要です。</text:p>
            <text:list text:style-name="L1">
              <text:list-item>
                <text:p text:style-name="P7"><text:span text:style-name="T4">Visual Studio (MSVC):</text:span><text:span text:style-name="T3"> </text:span><text:span text:style-name="Source_20_Text"><text:span text:style-name="T3">cl.exe</text:span></text:span><text:span text:style-name="T3"> が利用可能な状態（Developer Command Prompt を使用）</text:span></text:p>
              </text:list-item>
              <text:list-item>
                <text:p text:style-name="P7"><text:span text:style-name="T4">MinGW / GCC:</text:span><text:span text:style-name="T3"> </text:span><text:span text:style-name="Source_20_Text"><text:span text:style-name="T3">gcc</text:span></text:span><text:span text:style-name="T3"> が環境変数 PATH に通っている状態</text:span></text:p>
              </text:list-item>
            </text:list>
            <text:h text:style-name="P6" text:outline-level="3">2. プロジェクトファイルの作成</text:h>
            <text:p text:style-name="P3"><text:span text:style-name="T3">適当なフォルダを作り、その中にスクリプト本体と、ビルド設定ファイル（</text:span><text:span text:style-name="Source_20_Text"><text:span text:style-name="T3">project.janet</text:span></text:span><text:span text:style-name="T3">）を用意します。</text:span></text:p>
            <text:p text:style-name="P3"><text:span text:style-name="Source_20_Text"><text:span text:style-name="T4">main.janet</text:span></text:span><text:span text:style-name="T4"> </text:span><text:span text:style-name="T5">（実行したいスクリプト）</text:span></text:p>
            <text:p text:style-name="P8">コード スニペット</text:p>
            <text:p text:style-name="P9"><text:span text:style-name="Source_20_Text"><text:span text:style-name="T6">(defn main [&amp; args]</text:span></text:span></text:p>
            <text:p text:style-name="P10"><text:span text:style-name="Source_20_Text"><text:span text:style-name="T6"><text:s text:c="2"/>(print "Hello, Windows Standalone EXE!"))</text:span></text:span></text:p>
            <text:p text:style-name="P11"><text:span text:style-name="T3">⚠️ </text:span><text:span text:style-name="T5">注意</text:span><text:span text:style-name="T4">:</text:span><text:span text:style-name="T3"> スタンドアロン化する場合、エントリーポイントとなる </text:span><text:span text:style-name="Source_20_Text"><text:span text:style-name="T3">(defn main [&amp; args] ...)</text:span></text:span><text:span text:style-name="T3"> 関数が必須です。</text:span></text:p>
            <text:p text:style-name="P3"><text:span text:style-name="Source_20_Text"><text:span text:style-name="T4">project.janet</text:span></text:span><text:span text:style-name="T4"> </text:span><text:span text:style-name="T5">（ビルド設定）</text:span></text:p>
            <text:p text:style-name="P8">コード スニペット</text:p>
            <text:p text:style-name="P9"><text:span text:style-name="Source_20_Text"><text:span text:style-name="T6">(declare-project</text:span></text:span></text:p>
            <text:p text:style-name="P10"><text:span text:style-name="Source_20_Text"><text:span text:style-name="T6"><text:s text:c="2"/>:name "my-janet-app"</text:span></text:span></text:p>
            <text:p text:style-name="P10"><text:span text:style-name="Source_20_Text"><text:span text:style-name="T6"><text:s text:c="2"/>:author "Your Name")</text:span></text:span></text:p>
            <text:p text:style-name="P10"/>
            <text:p text:style-name="P10"><text:span text:style-name="Source_20_Text"><text:span text:style-name="T6">(declare-executable</text:span></text:span></text:p>
            <text:p text:style-name="P10"><text:span text:style-name="Source_20_Text"><text:span text:style-name="T6"><text:s text:c="2"/>:name "my_app" # 出力されるファイル名 (my_app.exe)</text:span></text:span></text:p>
            <text:p text:style-name="P10"><text:span text:style-name="Source_20_Text"><text:span text:style-name="T6"><text:s text:c="2"/>:main "main.janet" # エントリーポイントのあるファイル</text:span></text:span></text:p>
            <text:p text:style-name="P10"><text:span text:style-name="Source_20_Text"><text:span text:style-name="T6"><text:s text:c="2"/>:is-janet-extension true)</text:span></text:span></text:p>
            <text:h text:style-name="P6" text:outline-level="3">3. ビルドの実行</text:h>
            <text:p text:style-name="P4">コマンドプロンプトや PowerShell で上記のフォルダに移動し、以下のコマンドを実行します。</text:p>
            <text:p text:style-name="P8">Bash</text:p>
            <text:p text:style-name="P9"><text:soft-page-break/><text:span text:style-name="Source_20_Text"><text:span text:style-name="T6">jpm build</text:span></text:span></text:p>
            <text:p text:style-name="P3"><text:span text:style-name="T3">ビルドが成功すると、同ディレクトリ内に </text:span><text:span text:style-name="Source_20_Text"><text:span text:style-name="T3">build/</text:span></text:span><text:span text:style-name="T3"> フォルダが生成され、その中に </text:span><text:span text:style-name="Source_20_Text"><text:span text:style-name="T4">my_app.exe</text:span></text:span><text:span text:style-name="T3"> が出力されます。この EXE ファイルは、Janet がインストールされていない他の Windows PC に持っていってもそのまま動かすことができます。</text:span></text:p>
            <text:h text:style-name="P5" text:outline-level="2">💡 知っておくと役立つTips</text:h>
            <text:list text:style-name="L2">
              <text:list-item>
                <text:p text:style-name="P12"><text:span text:style-name="T5">完全に静的なバイナリにしたい場合</text:span><text:span text:style-name="T3"> デフォルトのビルドでは Windows の標準Cランタイム（</text:span><text:span text:style-name="Source_20_Text"><text:span text:style-name="T3">vcruntime140.dll</text:span></text:span><text:span text:style-name="T3"> など）に動的リンクされる場合があります。もし完全に依存のないスタティックリンクにしたい場合は、</text:span><text:span text:style-name="Source_20_Text"><text:span text:style-name="T3">jpm</text:span></text:span><text:span text:style-name="T3"> の設定やコンパイラフラグで調整するか、MSVC の代わりに MinGW で </text:span><text:span text:style-name="Source_20_Text"><text:span text:style-name="T3">-static</text:span></text:span><text:span text:style-name="T3"> フラグを渡すように設定します。</text:span></text:p>
              </text:list-item>
              <text:list-item>
                <text:p text:style-name="P12"><text:span text:style-name="T4">C</text:span><text:span text:style-name="T5">言語ソースへの変換</text:span><text:span text:style-name="T3"> バイナリにする一歩手前として、Janet コードをC言語のソースコード（</text:span><text:span text:style-name="Source_20_Text"><text:span text:style-name="T3">.c</text:span></text:span><text:span text:style-name="T3"> ファイル）にトランスパイルすることも可能です。</text:span></text:p>
                <text:p text:style-name="P13">Bash</text:p>
                <text:p text:style-name="P14"><text:span text:style-name="Source_20_Text"><text:span text:style-name="T6">janet -c main.janet main.c</text:span></text:span></text:p>
                <text:p text:style-name="P12"><text:span text:style-name="T3">これを利用すれば、自分でコンパイルオプションをガチガチに固めて </text:span><text:span text:style-name="Source_20_Text"><text:span text:style-name="T3">cl</text:span></text:span><text:span text:style-name="T3"> や </text:span><text:span text:style-name="Source_20_Text"><text:span text:style-name="T3">gcc</text:span></text:span><text:span text:style-name="T3"> で手動ビルドすることも可能です。</text:span></text:p>
              </text:list-item>
            </text:list>
            <text:p text:style-name="P4">環境構築（Cコンパイラ周り）で引っかかることが多いので、もしビルドエラーなどが出たらエラーメッセージを教えてください！</text:p>
          </text:section>
        </text:section>
      </text:section>
      <text:p text:style-name="P15"/>
      <text:p text:style-name="P16">Gemini は AI であり、間違えることが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3:13:54.080046300</meta:creation-date>
    <dc:date>2026-06-17T13:16:06.097124600</dc:date>
    <meta:editing-duration>PT2M12S</meta:editing-duration>
    <meta:editing-cycles>1</meta:editing-cycles>
    <meta:document-statistic meta:table-count="0" meta:image-count="0" meta:object-count="0" meta:page-count="2" meta:paragraph-count="39" meta:word-count="1004" meta:character-count="1592" meta:non-whitespace-character-count="1474"/>
    <meta:generator>LibreOffice/26.2.4.2$Windows_X86_64 LibreOffice_project/0229ac93fcf0d7cbc6376066c6f35021cef002dc</meta:generator>
  </office:meta>
</office:document-meta>
</file>